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mbria1" fo:font-size="11pt" fo:language="en" fo:country="US" officeooo:rsid="000f0c0c" officeooo:paragraph-rsid="000f0c0c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mbria1" fo:font-size="11pt" fo:language="en" fo:country="US" officeooo:rsid="000f0c0c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style:text-position="super 58%"/>
    </style:style>
    <style:style style:name="T3" style:family="text">
      <style:text-properties officeooo:rsid="000f0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B. JUKA Technologies Internship Program (6 Weeks)</text:span></text:h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Week</text:p>
          </table:table-cell>
          <table:table-cell table:style-name="Table1.A1" office:value-type="string">
            <text:p text:style-name="P1">Objectives</text:p>
          </table:table-cell>
          <table:table-cell table:style-name="Table1.A1" office:value-type="string">
            <text:p text:style-name="P1">Topics Covered</text:p>
          </table:table-cell>
          <table:table-cell table:style-name="Table1.A1" office:value-type="string">
            <text:p text:style-name="P1">Practical Activities / Project</text:p>
          </table:table-cell>
        </table:table-row>
        <table:table-row table:style-name="Table1.1">
          <table:table-cell table:style-name="Table1.A1" office:value-type="string">
            <text:p text:style-name="P1">Week 1 – Hardware Repair &amp; Maintenance Fundamentals</text:p>
            <text:p text:style-name="P1"/>
            <text:p text:style-name="P2">[15<text:span text:style-name="T2">th</text:span> to 19<text:span text:style-name="T2">th</text:span> June 2026]</text:p>
          </table:table-cell>
          <table:table-cell table:style-name="Table1.A1" office:value-type="string">
            <text:p text:style-name="P1">• Understand computer hardware components<text:line-break/>• Learn computer safety procedures<text:line-break/>• Perform basic maintenance and troubleshooting</text:p>
          </table:table-cell>
          <table:table-cell table:style-name="Table1.A1" office:value-type="string">
            <text:p text:style-name="P1">Computer architecture<text:line-break/>Motherboard components<text:line-break/>CPU and RAM installation<text:line-break/>HDD vs SSD<text:line-break/>Power Supply Unit (PSU)<text:line-break/>Laptop disassembly<text:line-break/>Desktop assembly<text:line-break/>BIOS settings<text:line-break/>Preventive maintenance<text:line-break/>Diagnosing hardware faults</text:p>
          </table:table-cell>
          <table:table-cell table:style-name="Table1.A1" office:value-type="string">
            <text:p text:style-name="P1">Assemble/disassemble desktop<text:line-break/>Replace RAM, HDD/SSD &amp; PSU<text:line-break/>Professional cleaning<text:line-break/>Troubleshoot boot failures</text:p>
          </table:table-cell>
        </table:table-row>
        <table:table-row table:style-name="Table1.1">
          <table:table-cell table:style-name="Table1.A1" office:value-type="string">
            <text:p text:style-name="P1">Week 2 – Cabling &amp; Network Installation</text:p>
            <text:p text:style-name="P1"/>
            <text:p text:style-name="P2">[22<text:span text:style-name="T2">nd </text:span><text:s/>to 26<text:span text:style-name="T2">th </text:span><text:s/>June 2026]</text:p>
          </table:table-cell>
          <table:table-cell table:style-name="Table1.A1" office:value-type="string">
            <text:p text:style-name="P1">• Learn networking basics<text:line-break/>• Install/configure small office networks</text:p>
          </table:table-cell>
          <table:table-cell table:style-name="Table1.A1" office:value-type="string">
            <text:p text:style-name="P1">Networking fundamentals<text:line-break/>LAN vs WAN<text:line-break/>IP Addressing<text:line-break/>Routers<text:line-break/>Switches<text:line-break/>Ethernet standards<text:line-break/>T568A &amp; T568B<text:line-break/>Cable testing<text:line-break/>Printer sharing<text:line-break/>File sharing<text:line-break/>Network troubleshooting</text:p>
          </table:table-cell>
          <table:table-cell table:style-name="Table1.A1" office:value-type="string">
            <text:p text:style-name="P1">Terminate Ethernet cables<text:line-break/>Test cables<text:line-break/>Configure two PCs<text:line-break/>Share folders<text:line-break/>Share printers<text:line-break/>Configure static IPs</text:p>
          </table:table-cell>
        </table:table-row>
        <table:table-row table:style-name="Table1.1">
          <table:table-cell table:style-name="Table1.A1" office:value-type="string">
            <text:p text:style-name="P1">Week 3 – Desktop Management</text:p>
            <text:p text:style-name="P1"/>
            <text:p text:style-name="P2">[29<text:span text:style-name="T2">th</text:span> June 2026 to 03<text:span text:style-name="T2">rd</text:span> July 2026]</text:p>
          </table:table-cell>
          <table:table-cell table:style-name="Table1.A1" office:value-type="string">
            <text:p text:style-name="P1">Learn Windows administration and maintenance</text:p>
          </table:table-cell>
          <table:table-cell table:style-name="Table1.A1" office:value-type="string">
            <text:p text:style-name="P1">Windows installation<text:line-break/>Driver installation<text:line-break/>Windows Updates<text:line-break/>User Accounts<text:line-break/>Disk Management<text:line-break/>Device Manager<text:line-break/>Backup &amp; Restore<text:line-break/>Antivirus<text:line-break/>Software installation<text:line-break/>Performance optimization</text:p>
          </table:table-cell>
          <table:table-cell table:style-name="Table1.A1" office:value-type="string">
            <text:p text:style-name="P1">Install Windows 11<text:line-break/>Install drivers<text:line-break/>Partition drive<text:line-break/>Install Office<text:line-break/>Create users<text:line-break/>Optimize startup<text:line-break/>Configure Local Users and Groups</text:p>
          </table:table-cell>
        </table:table-row>
        <table:table-row table:style-name="Table1.1">
          <table:table-cell table:style-name="Table1.A1" office:value-type="string">
            <text:p text:style-name="P1">Week 4 – Frontend Development</text:p>
            <text:p text:style-name="P1"/>
            <text:p text:style-name="P2">[06<text:span text:style-name="T2">th</text:span> to 10<text:span text:style-name="T2">th</text:span> July 2026]</text:p>
          </table:table-cell>
          <table:table-cell table:style-name="Table1.A1" office:value-type="string">
            <text:p text:style-name="P1">Learn how websites are built</text:p>
          </table:table-cell>
          <table:table-cell table:style-name="Table1.A1" office:value-type="string">
            <text:p text:style-name="P1">HTML5<text:line-break/>CSS3<text:line-break/>Responsive Design<text:line-break/>Flexbox<text:line-break/>CSS Grid<text:line-break/><text:soft-page-break/>JavaScript Basics<text:line-break/>DOM Manipulation<text:line-break/>Forms<text:line-break/>Git Basics</text:p>
          </table:table-cell>
          <table:table-cell table:style-name="Table1.A1" office:value-type="string">
            <text:p text:style-name="P1">Build: Personal Portfolio, Business Website, Contact Form, Product Landing Page<text:line-break/><text:soft-page-break/>Mini Project: B. JUKA Technologies Homepage</text:p>
          </table:table-cell>
        </table:table-row>
        <table:table-row table:style-name="Table1.1">
          <table:table-cell table:style-name="Table1.A1" office:value-type="string">
            <text:p text:style-name="P1">Week 5 – Backend Development <text:span text:style-name="T3">&amp; Introduction to Flutter</text:span></text:p>
            <text:p text:style-name="P1"/>
            <text:p text:style-name="P2">[13<text:span text:style-name="T2">th</text:span> to 17<text:span text:style-name="T2">th </text:span>July 2026]</text:p>
          </table:table-cell>
          <table:table-cell table:style-name="Table1.A1" office:value-type="string">
            <text:p text:style-name="P1">Consolidate backend web development concepts.<text:line-break/>Understand the fundamentals of Flutter and cross-platform mobile application development.<text:line-break/>Learn Flutter project structure, widgets, and navigation.<text:line-break/>Build a simple mobile application using Flutter.</text:p>
          </table:table-cell>
          <table:table-cell table:style-name="Table1.A1" office:value-type="string">
            <text:p text:style-name="P1"><text:span text:style-name="Strong_20_Emphasis">Backend Development Review</text:span><text:line-break/>• JavaScript Functions<text:line-break/>• CRUD Operations<text:line-break/>• Browser Local Storage<text:line-break/>• Database Fundamentals<text:line-break/>• Web Project Structure<text:line-break/><text:line-break/><text:span text:style-name="Strong_20_Emphasis">Introduction to Flutter</text:span><text:line-break/>• What is Flutter?<text:line-break/>• Installing Flutter &amp; Android Studio<text:line-break/>• Flutter Project Structure<text:line-break/>• Dart Basics<text:line-break/>• Widgets (Stateless &amp; Stateful)<text:line-break/>• Layouts (Row, Column, Container)<text:line-break/>• Navigation Between Screens<text:line-break/>• Forms &amp; User Input</text:p>
          </table:table-cell>
          <table:table-cell table:style-name="Table1.A1" office:value-type="string">
            <text:p text:style-name="P3">Build a Login Screen.<text:line-break/>Build a Dashboard Screen.<text:line-break/>Create a Customer Registration Form.<text:line-break/>Implement Navigation Between Pages.<text:line-break/>Build a Simple Repair Management Mobile App (UI Only).<text:line-break/>Run the application on an Android Emulator or Physical Device.</text:p>
          </table:table-cell>
        </table:table-row>
        <table:table-row table:style-name="Table1.1">
          <table:table-cell table:style-name="Table1.A1" office:value-type="string">
            <text:p text:style-name="P1">Week 6 – CCTV Camera Installation &amp; Final Project</text:p>
            <text:p text:style-name="P1"/>
            <text:p text:style-name="P1"/>
            <text:p text:style-name="P2">[20<text:span text:style-name="T2">th</text:span> to 24<text:span text:style-name="T2">th </text:span>July 2026]</text:p>
          </table:table-cell>
          <table:table-cell table:style-name="Table1.A1" office:value-type="string">
            <text:p text:style-name="P1">Install/configure surveillance systems<text:line-break/>Integrate previous learning</text:p>
          </table:table-cell>
          <table:table-cell table:style-name="Table1.A1" office:value-type="string">
            <text:p text:style-name="P1">Types of CCTV<text:line-break/>DVR vs NVR<text:line-break/>Camera Positioning<text:line-break/>Cable Routing<text:line-break/>Power Supply<text:line-break/>IP Cameras<text:line-break/>Network Configuration<text:line-break/>Remote Viewing<text:line-break/>Maintenance<text:line-break/>Troubleshooting</text:p>
          </table:table-cell>
          <table:table-cell table:style-name="Table1.A1" office:value-type="string">
            <text:p text:style-name="P1">Install 4 cameras<text:line-break/>Configure DVR/NVR<text:line-break/>Remote viewing<text:line-break/>Test recording<text:line-break/>Fault diagnosis<text:line-break/>Final Project: PC repair, Windows install, LAN setup, frontend website, backend repair system, CCTV installation, presentation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charset="x-symbol"/>
    </style:style>
    <style:style style:name="ListLabel_20_2" style:display-name="ListLabel 2" style:family="text">
      <style:text-properties style:font-name="Cambria" fo:font-family="Cambria" style:font-family-generic="roman" style:font-pitch="variable" style:font-charset="x-symbol"/>
    </style:style>
    <style:style style:name="ListLabel_20_3" style:display-name="ListLabel 3" style:family="text">
      <style:text-properties style:font-name="Cambria" fo:font-family="Cambria" style:font-family-generic="roman" style:font-pitch="variable" style:font-charset="x-symbol"/>
    </style:style>
    <style:style style:name="ListLabel_20_4" style:display-name="ListLabel 4" style:family="text">
      <style:text-properties style:font-name="Cambria" fo:font-family="Cambria" style:font-family-generic="roman" style:font-pitch="variable" style:font-charset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7-12T11:00:22.714797394</dc:date>
    <meta:editing-duration>PT4M40S</meta:editing-duration>
    <meta:generator>LibreOffice/26.2.4.2$Linux_X86_64 LibreOffice_project/620$Build-2</meta:generator>
    <meta:document-statistic meta:table-count="1" meta:image-count="0" meta:object-count="0" meta:page-count="2" meta:paragraph-count="35" meta:word-count="439" meta:character-count="3157" meta:non-whitespace-character-count="2744"/>
    <meta:user-defined meta:name="AppVersion">14.0000</meta:user-defined>
    <meta:template xlink:type="simple" xlink:actuate="onRequest" xlink:title="Normal.dotm" xlink:href=""/>
  </office:meta>
</office:document-meta>
</file>